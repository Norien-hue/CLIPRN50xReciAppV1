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30.057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048cm" fo:break-before="auto" style:use-optimal-row-height="false"/>
    </style:style>
    <style:style style:name="ro4" style:family="table-row">
      <style:table-row-properties style:row-height="2.223cm" fo:break-before="auto" style:use-optimal-row-height="false"/>
    </style:style>
    <style:style style:name="ro5" style:family="table-row">
      <style:table-row-properties style:row-height="2.805cm" fo:break-before="auto" style:use-optimal-row-height="false"/>
    </style:style>
    <style:style style:name="ro6" style:family="table-row">
      <style:table-row-properties style:row-height="1.826cm" fo:break-before="auto" style:use-optimal-row-height="false"/>
    </style:style>
    <style:style style:name="ro7" style:family="table-row">
      <style:table-row-properties style:row-height="2.725cm" fo:break-before="auto" style:use-optimal-row-height="false"/>
    </style:style>
    <style:style style:name="ro8" style:family="table-row">
      <style:table-row-properties style:row-height="3.334cm" fo:break-before="auto" style:use-optimal-row-height="false"/>
    </style:style>
    <style:style style:name="ro9" style:family="table-row">
      <style:table-row-properties style:row-height="2.461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b4c7dc"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font-name="Calibri1"/>
    </style:style>
    <style:style style:name="ce12" style:family="table-cell" style:parent-style-name="Default" style:data-style-name="N0">
      <style:table-cell-properties fo:background-color="#b4c7dc"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0pt" style:font-name-asian="Segoe UI" style:font-size-asian="10pt" style:font-name-complex="Tahoma" style:font-size-complex="10pt"/>
    </style:style>
    <style:style style:name="ce13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top"/>
      <style:paragraph-properties fo:text-align="start" fo:margin-left="0cm"/>
      <style:text-properties style:font-name="Calibri1"/>
    </style:style>
    <style:style style:name="ce14" style:family="table-cell" style:parent-style-name="Default" style:data-style-name="N0">
      <style:table-cell-properties fo:background-color="#b4c7dc"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text-underline-style="none"/>
    </style:style>
    <style:style style:name="ce6" style:family="table-cell" style:parent-style-name="Default" style:data-style-name="N0">
      <style:table-cell-properties fo:background-color="#b4c7dc"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b4c7dc"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text-underline-style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 table:protected="true" table:protection-key="lDYb5VWof6bTqUrNHAhjOdqhS4k=" table:protection-key-digest-algorithm="http://www.w3.org/2000/09/xmldsig#sha1">
        <loext:table-protection loext:select-unprotected-cells="true"/>
        <table:table-column table:style-name="co1" table:default-cell-style-name="ce1"/>
        <table:table-column table:style-name="co2" table:default-cell-style-name="ce6"/>
        <table:table-column table:style-name="co3" table:number-columns-repeated="16382" table:default-cell-style-name="Default"/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Nombre Alumn@</text:p>
          </table:table-cell>
          <table:table-cell table:style-name="ce9" office:value-type="string" calcext:value-type="string">
            <text:p>José Aarón Sánchez Martí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mbre APP</text:p>
          </table:table-cell>
          <table:table-cell table:style-name="ce9" office:value-type="string" calcext:value-type="string">
            <text:p>ReciInventar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mbre BBDD (Phpmyadmin)</text:p>
          </table:table-cell>
          <table:table-cell table:style-name="ce12" office:value-type="string" calcext:value-type="string">
            <text:p>reciInventario_db (es mysql como aviso, no se si afecte)</text:p>
          </table:table-cell>
          <table:table-cell table:number-columns-repeated="16382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Nombre Tabla independiente 1</text:p>
          </table:table-cell>
          <table:table-cell table:style-name="ce13" office:value-type="string" calcext:value-type="string">
            <text:p>Usuario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table:style-name="ce14" office:value-type="string" calcext:value-type="string">
            <text:p>SingUpController, SettingsController, NewTransaccion, ModTransaccion, MainController, LoginController, EscanearController, ChangePassw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office:value-type="string" calcext:value-type="string">
            <text:p>NewUser , SingUpControll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office:value-type="string" calcext:value-type="string">
            <text:p>SettingsController, NewTransaccion, ModUser, ModTransaccion, ModProducto, MainController, LoginController, Escanear, ChangePassw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office:value-type="string" calcext:value-type="string">
            <text:p>MainController</text:p>
          </table:table-cell>
          <table:table-cell table:number-columns-repeated="16382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Nombre Tabla independiente 2</text:p>
          </table:table-cell>
          <table:table-cell table:style-name="ce5" office:value-type="string" calcext:value-type="string">
            <text:p>Producto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office:value-type="string" calcext:value-type="string">
            <text:p>NewTransaccion, ModTransaccion, MainController, Escan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office:value-type="string" calcext:value-type="string">
            <text:p>NewProduc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office:value-type="string" calcext:value-type="string">
            <text:p>ModProduc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office:value-type="string" calcext:value-type="string">
            <text:p>MainController</text:p>
          </table:table-cell>
          <table:table-cell table:number-columns-repeated="16382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Nombre Tabla INTERMEDIA</text:p>
          </table:table-cell>
          <table:table-cell table:style-name="ce5" office:value-type="string" calcext:value-type="string">
            <text:p>Recic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table:style-name="ce16" office:value-type="string" calcext:value-type="string">
            <text:p>MainController, ModProduc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office:value-type="string" calcext:value-type="string">
            <text:p>Escanear, NewTransacc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office:value-type="string" calcext:value-type="string">
            <text:p>ModProducto, ModTransacc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office:value-type="string" calcext:value-type="string">
            <text:p>MainControler</text:p>
          </table:table-cell>
          <table:table-cell table:number-columns-repeated="16382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Validación de campos</text:p>
          </table:table-cell>
          <table:table-cell table:style-name="ce5"/>
          <table:table-cell table:number-columns-repeated="16382"/>
        </table:table-row>
        <table:table-row table:style-name="ro2">
          <table:table-cell table:style-name="ce4" office:value-type="string" calcext:value-type="string">
            <text:p>Controladores donde se hace la validación y qué método de validación se ha seguido (básico, validator, validator+css..)</text:p>
          </table:table-cell>
          <table:table-cell office:value-type="string" calcext:value-type="string">
            <text:p>SettingsController LoginController, SingUpController, NewProducto, ModProducto, NewTransaccion, ModTransaccion, NewUser, ModUser, Escanear, ChangePasswd <text:s text:c="2"/>Todo se ha hecho con validación básica</text:p>
          </table:table-cell>
          <table:table-cell table:number-columns-repeated="16382"/>
        </table:table-row>
        <table:table-row table:style-name="ro1">
          <table:table-cell table:style-name="ce4"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Eventos y Menús Contextuales</text:p>
          </table:table-cell>
          <table:table-cell table:style-name="ce5"/>
          <table:table-cell table:number-columns-repeated="16382"/>
        </table:table-row>
        <table:table-row table:style-name="ro3">
          <table:table-cell table:style-name="ce4" office:value-type="string" calcext:value-type="string">
            <text:p>Controlador/es donde se hacen eventos no estándar (teclado, ratón, otros) y qué eventos son. <text:s/>Controlador/es donde se han usado animaciones, a qué nodo se han aplicado y en qué consisten</text:p>
          </table:table-cell>
          <table:table-cell office:value-type="string" calcext:value-type="string">
            <text:p>Los unicos eventos que hay son al dejar el ratón encima de los botones (nodo) que cambia el stack pane o los que cambian el tab, que lo que hacen es mostrar un nombre mas completo o el mismo en un toolTip, esto ocurre en MainController</text:p>
          </table:table-cell>
          <table:table-cell table:number-columns-repeated="16382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CSS</text:p>
          </table:table-cell>
          <table:table-cell table:style-name="ce5"/>
          <table:table-cell table:number-columns-repeated="16382"/>
        </table:table-row>
        <table:table-row table:style-name="ro4">
          <table:table-cell table:style-name="ce4" office:value-type="string" calcext:value-type="string">
            <text:p>Controlador/es donde se ha usado CSS o por el contrario FXMLs donde se ha/n usado CSS</text:p>
          </table:table-cell>
          <table:table-cell office:value-type="string" calcext:value-type="string">
            <text:p>No se aplica directamente en los controladores, se hace desde una clase auxiliar que se llama StartWin</text:p>
          </table:table-cell>
          <table:table-cell table:number-columns-repeated="16382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Animaciones</text:p>
          </table:table-cell>
          <table:table-cell table:style-name="ce5"/>
          <table:table-cell table:number-columns-repeated="16382"/>
        </table:table-row>
        <table:table-row table:style-name="ro5">
          <table:table-cell table:style-name="ce4"/>
          <table:table-cell office:value-type="string" calcext:value-type="string">
            <text:p>Dentro del controlador MainController cada vez que se cambia de stackpane o tabpane se hace un fade in para el contenido de la ventana.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5"/>
          <table:table-cell table:number-columns-repeated="16382"/>
        </table:table-row>
        <table:table-row table:style-name="ro1">
          <table:table-cell table:style-name="ce3" office:value-type="string" calcext:value-type="string">
            <text:p>Investigación y extras</text:p>
          </table:table-cell>
          <table:table-cell table:number-columns-repeated="16383"/>
        </table:table-row>
        <table:table-row table:style-name="ro6">
          <table:table-cell table:style-name="ce4" office:value-type="string" calcext:value-type="string">
            <text:p>Buscadores extra no esenciales para el INSERT en la intermedia</text:p>
          </table:table-cell>
          <table:table-cell office:value-type="string" calcext:value-type="string">
            <text:p>Los controladores de NewProducto MainProducto tienen un buscador para encontrar el numero de barras del producto o para encontrar el nombre del tipo de codigo de barras</text:p>
          </table:table-cell>
          <table:table-cell table:number-columns-repeated="16382"/>
        </table:table-row>
        <table:table-row table:style-name="ro7">
          <table:table-cell table:style-name="ce4" office:value-type="string" calcext:value-type="string">
            <text:p>Carga y/o exportación de datos, en qué Controlador está y en qué consiste</text:p>
          </table:table-cell>
          <table:table-cell office:value-type="string" calcext:value-type="string">
            <text:p>Se cargan las cosas directamente de la base de datos.</text:p>
          </table:table-cell>
          <table:table-cell table:number-columns-repeated="16382"/>
        </table:table-row>
        <table:table-row table:style-name="ro8">
          <table:table-cell table:style-name="ce4" office:value-type="string" calcext:value-type="string">
            <text:p>Controlador/es donde se ha usado librería extra y en qué consiste</text:p>
          </table:table-cell>
          <table:table-cell office:value-type="string" calcext:value-type="string">
            <text:p>Se ha usado chartFX, aparece en MainController, la librería permite hacer muchísimas cosas pero sencillamente no daba tiempo a usarlas todas, solo la he usado para hacer gráficos de barras en las que podrás ver quien ha reducido mas emisiones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Otros</text:p>
          </table:table-cell>
          <table:table-cell office:value-type="string" calcext:value-type="string">
            <text:p>Se gestiona una app con vario roles, y evita que se puedan tocar cosas de administrador siendo usuario incluso si están en la misma ventana.</text:p>
          </table:table-cell>
          <table:table-cell table:number-columns-repeated="16382"/>
        </table:table-row>
        <table:table-row table:style-name="ro1" table:number-rows-repeated="69">
          <table:table-cell/>
          <table:table-cell table:style-name="ce5"/>
          <table:table-cell table:number-columns-repeated="16382"/>
        </table:table-row>
        <table:table-row table:style-name="ro10" table:number-rows-repeated="1048465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5:34:10.9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DAM Cazorla</meta:initial-creator>
    <meta:creation-date>2025-12-05T09:59:55Z</meta:creation-date>
    <dc:date>2025-12-10T16:18:52.287000000</dc:date>
    <meta:editing-duration>PT23M30S</meta:editing-duration>
    <meta:editing-cycles>6</meta:editing-cycles>
    <meta:document-statistic meta:table-count="1" meta:cell-count="56" meta:object-count="0"/>
  </office:meta>
</office:document-meta>
</file>